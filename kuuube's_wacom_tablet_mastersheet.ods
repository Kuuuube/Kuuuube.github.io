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807.99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516.7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6-05-2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6-05-2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6-05-2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6-05-2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6-05-2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6-05-2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6-05-2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6-05-2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6-05-2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6-05-2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6-05-2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6-05-2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6-05-2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6-05-2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6-05-2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6-05-2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172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6-05-2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6-05-2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6-05-2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6-05-2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202.51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6-05-2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6-05-2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232.5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6-05-2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6-05-2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262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6-05-2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6-05-2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6-05-2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6-05-2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6-05-2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6-05-2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6-05-2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6-05-2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352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6-05-2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367.51pt" draw:caption-point-x="-11.54pt" draw:caption-point-y="-22.25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6-05-2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6-05-2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6-05-2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6-05-2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6-05-2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6-05-2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6-05-2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6-05-2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6-05-2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6-05-2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6-05-2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6-05-2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6-05-2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6-05-2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6-05-2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6-05-2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6-05-2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6-05-2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6-05-2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6-05-2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6-05-2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6-05-2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6-05-2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6-05-2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6-05-2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6-05-2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6-05-2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6-05-2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6-05-2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6-05-2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6-05-2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6-05-2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6-05-2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6-05-2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6-05-2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6-05-2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6-05-2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6-05-2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6-05-2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6-05-2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6-05-2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6-05-2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6-05-2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6-05-2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6-05-2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6-05-2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6-05-2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6-05-2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6-05-2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6-05-2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6-05-2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6-05-2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6-05-2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6-05-2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6-05-2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6-05-2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6-05-2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6-05-2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6-05-2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6-05-25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6-05-2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ACP-7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6-05-25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6-05-2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ACP-7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6-05-25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6-05-2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ACP-7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6-05-2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6-05-2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6-05-2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6-05-2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6-05-2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6-05-2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6-05-2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1072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6-05-2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1087.51pt" draw:caption-point-x="-11.54pt" draw:caption-point-y="-22.25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6-05-2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1102.51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6-05-2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1117.5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6-05-2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1132.5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6-05-2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1147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6-05-2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65.26pt" svg:height="25.51pt" svg:x="1699.48pt" svg:y="1162.49pt" draw:caption-point-x="-11.54pt" draw:caption-point-y="-22.22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6-05-2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65.26pt" svg:height="25.48pt" svg:x="1699.48pt" svg:y="1177.51pt" draw:caption-point-x="-11.54pt" draw:caption-point-y="-22.25pt">
              <dc:date>2026-05-2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6-05-2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6-05-2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6-05-2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6-05-2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6-05-2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6-05-2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6-05-2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6-05-2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6-05-2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6-05-2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6-05-2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6-05-2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6-05-2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6-05-2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6-05-2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6-05-2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6-05-2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6-05-2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6-05-2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6-05-2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6-05-2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6-05-2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6-05-2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6-05-2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6-05-2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6-05-2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6-05-2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6-05-2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6-05-2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6-05-2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6-05-2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6-05-2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6-05-2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6-05-2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6-05-2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6-05-2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6-05-2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6-05-2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6-05-2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6-05-2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6-05-2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6-05-2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6-05-2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6-05-2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6-05-2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6-05-2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6-05-2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6-05-2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6-05-2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6-05-2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6-05-2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6-05-2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6-05-2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6-05-2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6-05-2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6-05-2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6-05-2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6-05-2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6-05-2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6-05-2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6-05-2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6-05-2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6-05-2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6-05-2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6-05-2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6-05-25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6-05-25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6-05-25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6-05-25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6-05-2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6-05-2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6-05-2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17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6-05-2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8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6-05-2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20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21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23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24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26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27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6-05-2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29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6-05-2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30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6-05-2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32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6-05-2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33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6-05-2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35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6-05-2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36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6-05-2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38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6-05-2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39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41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6-05-2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42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6-05-2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44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6-05-2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45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47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6-05-2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48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6-05-2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50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6-05-2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51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53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6-05-2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54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table:number-columns-spanned="1" table:number-rows-spanned="49"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6-05-25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, ACK-25611Z, ACK-256011Z, ACK-25619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6-05-25T00:00:00</dc:date>
              <text:p text:style-name="P1">(Wacom Pro Pen 3E)</text:p>
            </office:annotation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, ACK-25611Z, ACK-256011Z, ACK-25619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6-05-25T00:00:00</dc:date>
              <text:p text:style-name="P1">(Wacom Art Pen 2)</text:p>
            </office:annotation>
            <text:p>ACP-700</text:p>
          </table:table-cell>
          <table:table-cell table:style-name="ce8" office:value-type="string" calcext:value-type="string">
            <text:p>15.5g</text:p>
          </table:table-cell>
          <table:table-cell table:style-name="ce8" office:value-type="string" calcext:value-type="string">
            <text:p>160 x 13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Rotation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-25611Z, ACK-256011Z, ACK-25619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6-05-2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6-05-2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6-05-2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6-05-2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682.5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6-05-2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697.49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6-05-2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71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6-05-2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72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6-05-2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74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6-05-2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75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6-05-2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772.5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6-05-2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78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6-05-2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802.49pt" draw:caption-point-x="-11.54pt" draw:caption-point-y="-22.22pt">
              <dc:date>2026-05-2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6-05-2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817.51pt" draw:caption-point-x="-11.54pt" draw:caption-point-y="-22.25pt">
              <dc:date>2026-05-2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6-05-2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832.51pt" draw:caption-point-x="-11.54pt" draw:caption-point-y="-22.22pt">
              <dc:date>2026-05-2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6-05-2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6-05-2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862.5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6-05-2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87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6-05-2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89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6-05-25T00:00:00</dc:date>
              <text:p text:style-name="P1">(Intuos2 Designer Pen) (Design Pen)</text:p>
            </office:annotation>
            <text:p>XP-501A</text:p>
          </table:table-cell>
          <table:table-cell table:style-name="ce8" office:value-type="string" calcext:value-type="string">
            <text:p>19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90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/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6-05-2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92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6-05-2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93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6-05-2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952.5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6-05-2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967.49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6-05-2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98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6-05-2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99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6-05-2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012.51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6-05-2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027.5pt" draw:caption-point-x="-11.54pt" draw:caption-point-y="-22.22pt">
              <dc:date>2026-05-2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04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6-05-2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105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107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6-05-2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08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6-05-2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10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6-05-2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13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6-05-2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1147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6-05-2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732.73pt" svg:y="1162.49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6-05-2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177.51pt" draw:caption-point-x="-11.54pt" draw:caption-point-y="-22.25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6-05-2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192.51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6-05-2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207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6-05-2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732.73pt" svg:y="1222.5pt" draw:caption-point-x="-11.54pt" draw:caption-point-y="-22.22pt">
              <dc:date>2026-05-2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6-05-2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6-05-2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6-05-25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6-05-25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97.5pt" draw:caption-point-x="-11.54pt" draw:caption-point-y="-22.22pt">
              <dc:date>2026-05-25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312.5pt" draw:caption-point-x="-11.54pt" draw:caption-point-y="-22.22pt">
              <dc:date>2026-05-25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6-05-2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6-05-2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6-05-2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6-05-2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6-05-2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6-05-2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6-05-2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6-05-2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6-05-2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6-05-2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6-05-2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6-05-2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6-05-2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6-05-2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6-05-2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6-05-2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6-05-2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6-05-2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6-05-2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6-05-2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1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20" office:value-type="string" calcext:value-type="string">
            <text:p>Sources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22" office:value-type="string" calcext:value-type="string">
            <text:p><text:a xlink:href="https://estore.wacom.com.cn/goods_detail/901" xlink:type="simple">https://estore.wacom.com.cn/goods_detail/9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71" meta:object-count="0"/>
    <meta:generator>LibreOfficeDev/6.0.5.2$Linux_X86_64 LibreOffice_project/</meta:generator>
  </office:meta>
</office:document-meta>
</file>